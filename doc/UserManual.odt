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101" officeooo:paragraph-rsid="00162101"/>
    </style:style>
    <style:style style:name="P2" style:family="paragraph" style:parent-style-name="Standard">
      <style:paragraph-properties fo:text-align="center" style:justify-single-word="false"/>
      <style:text-properties officeooo:rsid="0019cb39" officeooo:paragraph-rsid="0019cb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r Manual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21:55:16.862727114</meta:creation-date>
    <dc:date>2026-05-05T21:57:40.501463006</dc:date>
    <meta:editing-duration>PT2M23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