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2101" officeooo:paragraph-rsid="00162101"/>
    </style:style>
    <style:style style:name="P2" style:family="paragraph" style:parent-style-name="Standard">
      <style:paragraph-properties fo:text-align="center" style:justify-single-word="false"/>
      <style:text-properties officeooo:rsid="0016a06a" officeooo:paragraph-rsid="0016a06a"/>
    </style:style>
    <style:style style:name="P3" style:family="paragraph" style:parent-style-name="Standard">
      <style:paragraph-properties fo:text-align="center" style:justify-single-word="false"/>
      <style:text-properties fo:font-size="21pt" officeooo:rsid="00162101" officeooo:paragraph-rsid="00162101" style:font-size-asian="21pt" style:font-size-complex="21pt"/>
    </style:style>
    <style:style style:name="P4" style:family="paragraph" style:parent-style-name="Standard">
      <style:paragraph-properties fo:text-align="center" style:justify-single-word="false"/>
      <style:text-properties fo:font-size="18pt" fo:font-weight="normal" officeooo:rsid="001d2764" officeooo:paragraph-rsid="001d2764" style:font-size-asian="18pt" style:font-weight-asian="normal" style:font-size-complex="18pt" style:font-weight-complex="normal"/>
    </style:style>
    <style:style style:name="P5" style:family="paragraph" style:parent-style-name="Standard">
      <style:text-properties fo:font-size="16pt" fo:font-weight="bold" officeooo:rsid="0016a06a" officeooo:paragraph-rsid="001d6844" style:font-size-asian="16pt" style:font-weight-asian="bold" style:font-size-complex="16pt" style:font-weight-complex="bold"/>
    </style:style>
    <style:style style:name="P6" style:family="paragraph" style:parent-style-name="Standard">
      <style:text-properties fo:font-size="16pt" fo:font-weight="bold" officeooo:rsid="001c3510" officeooo:paragraph-rsid="001d6844" style:font-size-asian="16pt" style:font-weight-asian="bold" style:font-size-complex="16pt" style:font-weight-complex="bold"/>
    </style:style>
    <style:style style:name="P7" style:family="paragraph" style:parent-style-name="Standard">
      <style:text-properties fo:font-size="16pt" fo:font-weight="bold" officeooo:rsid="00292293" officeooo:paragraph-rsid="00292293" style:font-size-asian="16pt" style:font-weight-asian="bold" style:font-size-complex="16pt" style:font-weight-complex="bold"/>
    </style:style>
    <style:style style:name="P8" style:family="paragraph" style:parent-style-name="Standard">
      <style:text-properties fo:font-size="16pt" fo:font-weight="bold" officeooo:rsid="002a0adf" officeooo:paragraph-rsid="002a0adf" style:font-size-asian="16pt" style:font-weight-asian="bold" style:font-size-complex="16pt" style:font-weight-complex="bold"/>
    </style:style>
    <style:style style:name="P9" style:family="paragraph" style:parent-style-name="Standard">
      <style:text-properties fo:font-size="16pt" fo:font-weight="bold" officeooo:rsid="00316315" officeooo:paragraph-rsid="00316315" style:font-size-asian="16pt" style:font-weight-asian="bold" style:font-size-complex="16pt" style:font-weight-complex="bold"/>
    </style:style>
    <style:style style:name="P10" style:family="paragraph" style:parent-style-name="Standard">
      <style:text-properties fo:font-size="16pt" officeooo:rsid="00198708" officeooo:paragraph-rsid="00198708" style:font-size-asian="16pt" style:font-size-complex="16pt"/>
    </style:style>
    <style:style style:name="P11" style:family="paragraph" style:parent-style-name="Standard">
      <style:text-properties fo:font-size="16pt" fo:font-style="normal" fo:font-weight="bold" officeooo:rsid="002038d0" officeooo:paragraph-rsid="002038d0" style:font-size-asian="16pt" style:font-style-asian="normal" style:font-weight-asian="bold" style:font-size-complex="16pt" style:font-style-complex="normal" style:font-weight-complex="bold"/>
    </style:style>
    <style:style style:name="P12" style:family="paragraph" style:parent-style-name="Standard">
      <style:text-properties officeooo:rsid="00180c9a" officeooo:paragraph-rsid="00180c9a"/>
    </style:style>
    <style:style style:name="P13" style:family="paragraph" style:parent-style-name="Standard">
      <style:text-properties officeooo:rsid="00198708" officeooo:paragraph-rsid="00198708"/>
    </style:style>
    <style:style style:name="P14" style:family="paragraph" style:parent-style-name="Standard">
      <style:text-properties fo:font-size="12pt" fo:font-weight="normal" officeooo:rsid="001c3510" officeooo:paragraph-rsid="001d6844" style:font-size-asian="10.5pt" style:font-weight-asian="normal" style:font-size-complex="12pt" style:font-weight-complex="normal"/>
    </style:style>
    <style:style style:name="P15" style:family="paragraph" style:parent-style-name="Standard">
      <style:text-properties fo:font-size="12pt" fo:font-weight="normal" officeooo:rsid="001d2764" officeooo:paragraph-rsid="001d6844" style:font-size-asian="10.5pt" style:font-weight-asian="normal" style:font-size-complex="12pt" style:font-weight-complex="normal"/>
    </style:style>
    <style:style style:name="P16" style:family="paragraph" style:parent-style-name="Standard">
      <style:text-properties officeooo:rsid="001d6844" officeooo:paragraph-rsid="001d6844"/>
    </style:style>
    <style:style style:name="P17" style:family="paragraph" style:parent-style-name="Standard">
      <style:text-properties officeooo:rsid="002038d0" officeooo:paragraph-rsid="002038d0"/>
    </style:style>
    <style:style style:name="P18" style:family="paragraph" style:parent-style-name="Standard">
      <style:text-properties officeooo:rsid="00292293" officeooo:paragraph-rsid="00292293"/>
    </style:style>
    <style:style style:name="P19" style:family="paragraph" style:parent-style-name="Standard">
      <style:text-properties officeooo:rsid="002a0adf" officeooo:paragraph-rsid="002a0adf"/>
    </style:style>
    <style:style style:name="P20" style:family="paragraph" style:parent-style-name="Standard">
      <style:text-properties officeooo:paragraph-rsid="00180c9a"/>
    </style:style>
    <style:style style:name="P21" style:family="paragraph" style:parent-style-name="Standard">
      <style:text-properties officeooo:rsid="00316315" officeooo:paragraph-rsid="00316315"/>
    </style:style>
    <style:style style:name="P22" style:family="paragraph" style:parent-style-name="Standard">
      <style:text-properties officeooo:rsid="0016a06a" officeooo:paragraph-rsid="001d6844"/>
    </style:style>
    <style:style style:name="P23" style:family="paragraph" style:parent-style-name="Standard">
      <style:text-properties officeooo:rsid="0037e791" officeooo:paragraph-rsid="0037e791"/>
    </style:style>
    <style:style style:name="P24" style:family="paragraph" style:parent-style-name="Standard">
      <style:text-properties fo:font-size="16pt" fo:font-weight="bold" officeooo:rsid="0037e791" officeooo:paragraph-rsid="0037e791" style:font-size-asian="16pt" style:font-weight-asian="bold" style:font-size-complex="16pt" style:font-weight-complex="bold"/>
    </style:style>
    <style:style style:name="T1" style:family="text">
      <style:text-properties officeooo:rsid="00180c9a"/>
    </style:style>
    <style:style style:name="T2" style:family="text">
      <style:text-properties fo:font-weight="bold" style:font-weight-asian="bold" style:font-weight-complex="bold"/>
    </style:style>
    <style:style style:name="T3" style:family="text">
      <style:text-properties fo:font-weight="bold" officeooo:rsid="002f0a96" style:font-weight-asian="bold" style:font-weight-complex="bold"/>
    </style:style>
    <style:style style:name="T4" style:family="text">
      <style:text-properties fo:font-weight="bold" officeooo:rsid="0030ceea" style:font-weight-asian="bold" style:font-weight-complex="bold"/>
    </style:style>
    <style:style style:name="T5" style:family="text">
      <style:text-properties fo:font-weight="bold" officeooo:rsid="00350d20" style:font-weight-asian="bold" style:font-weight-complex="bold"/>
    </style:style>
    <style:style style:name="T6" style:family="text">
      <style:text-properties officeooo:rsid="00197387"/>
    </style:style>
    <style:style style:name="T7" style:family="text">
      <style:text-properties officeooo:rsid="001aff3f"/>
    </style:style>
    <style:style style:name="T8" style:family="text">
      <style:text-properties officeooo:rsid="001d2764"/>
    </style:style>
    <style:style style:name="T9" style:family="text">
      <style:text-properties fo:font-size="18pt" style:font-size-asian="18pt" style:font-size-complex="18pt"/>
    </style:style>
    <style:style style:name="T10" style:family="text">
      <style:text-properties fo:font-size="18pt" officeooo:rsid="00180c9a" style:font-size-asian="18pt" style:font-size-complex="18pt"/>
    </style:style>
    <style:style style:name="T11" style:family="text">
      <style:text-properties fo:font-size="18pt" officeooo:rsid="001d2764" style:font-size-asian="18pt" style:font-size-complex="18pt"/>
    </style:style>
    <style:style style:name="T12" style:family="text">
      <style:text-properties officeooo:rsid="0022a286"/>
    </style:style>
    <style:style style:name="T13" style:family="text">
      <style:text-properties officeooo:rsid="0023f5b2"/>
    </style:style>
    <style:style style:name="T14" style:family="text">
      <style:text-properties officeooo:rsid="00273d30"/>
    </style:style>
    <style:style style:name="T15" style:family="text">
      <style:text-properties officeooo:rsid="0028e55a"/>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bold" officeooo:rsid="00180c9a" style:font-size-asian="16pt" style:font-weight-asian="bold" style:font-size-complex="16pt" style:font-weight-complex="bold"/>
    </style:style>
    <style:style style:name="T18" style:family="text">
      <style:text-properties fo:font-size="16pt" officeooo:rsid="002c1c0d" style:font-size-asian="16pt" style:font-size-complex="16pt"/>
    </style:style>
    <style:style style:name="T19" style:family="text">
      <style:text-properties fo:font-size="16pt" fo:font-weight="normal" officeooo:rsid="002c1c0d" style:font-size-asian="16pt" style:font-weight-asian="normal" style:font-size-complex="16pt" style:font-weight-complex="normal"/>
    </style:style>
    <style:style style:name="T20" style:family="text">
      <style:text-properties officeooo:rsid="002f0a96"/>
    </style:style>
    <style:style style:name="T21" style:family="text">
      <style:text-properties officeooo:rsid="0030ceea"/>
    </style:style>
    <style:style style:name="T22" style:family="text">
      <style:text-properties officeooo:rsid="00316315"/>
    </style:style>
    <style:style style:name="T23" style:family="text">
      <style:text-properties officeooo:rsid="0033179b"/>
    </style:style>
    <style:style style:name="T24" style:family="text">
      <style:text-properties officeooo:rsid="0035138f"/>
    </style:style>
    <style:style style:name="T25" style:family="text">
      <style:text-properties officeooo:rsid="0035481e"/>
    </style:style>
    <style:style style:name="T26" style:family="text">
      <style:text-properties officeooo:rsid="0035da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chnical <text:span text:style-name="T8">M</text:span>anual</text:p>
      <text:p text:style-name="P1"/>
      <text:p text:style-name="P2"><text:span text:style-name="T10">Architectural </text:span><text:span text:style-name="T11">C</text:span><text:span text:style-name="T9">hoices</text:span></text:p>
      <text:p text:style-name="P2"><text:span text:style-name="T9"/></text:p>
      <text:p text:style-name="P20"><text:span text:style-name="T17">SecretKeyFactory </text:span><text:span text:style-name="T19">(</text:span><text:span text:style-name="T16">PBKDF2</text:span><text:span text:style-name="T18">)</text:span></text:p>
      <text:p text:style-name="P12">Preferred over <text:span text:style-name="T2">MessageDigest</text:span>, for safety reasons: <text:span text:style-name="T2">MessageDigest </text:span>does not salt the hashed password, unlike what happens with <text:span text:style-name="T2">SecretKeyFactory</text:span>, <text:span text:style-name="T6">requiring us to provide a salt, in compliance to the security best practices, </text:span><text:span text:style-name="T20">permitting us also </text:span><text:span text:style-name="T3">PBKDF2</text:span>. <text:span text:style-name="T20">It’s an approach more computationally-expensive if compared to </text:span><text:span text:style-name="T3">MessageDigest</text:span><text:span text:style-name="T20">, but that does not concern us since it’s a matter of milli-seconds the moment of password hashing.</text:span></text:p>
      <text:p text:style-name="P12"/>
      <text:p text:style-name="P10"><text:span text:style-name="T2">ResourcesBundle</text:span> (<text:span text:style-name="T2">i18n</text:span>)</text:p>
      <text:p text:style-name="P13">The application is designed to be locale-independent, using the standard <text:span text:style-name="T2">java.util.ResourceBundle </text:span>API, storing user-facing strings inside of a <text:span text:style-name="T2">.properties</text:span> file, <text:span text:style-name="T7">so that the UI is translated at runtime.</text:span></text:p>
      <text:p text:style-name="P13"/>
      <text:p text:style-name="P11">Sealed Classes</text:p>
      <text:p text:style-name="P17">Some hierarchies are implemented through sealed classes to prevent wrongful extensions of classes, such as <text:span text:style-name="T2">User</text:span>, that’s allowing only <text:span text:style-name="T2">Guest</text:span>, <text:span text:style-name="T5">Logged</text:span>, <text:span text:style-name="T2">TicketsClerk </text:span>and <text:span text:style-name="T2">Projectionist </text:span>to extend it. <text:span text:style-name="T12">Besides that, it’s usefulness is found when approaching pattern matching via switch statements, granting completeness by forcing to consider every permitted </text:span><text:span text:style-name="T21">extending class</text:span><text:span text:style-name="T13">, </text:span><text:span text:style-name="T21">eliminating the necessity for a </text:span><text:span text:style-name="T4">default </text:span><text:span text:style-name="T21">case and blocking </text:span><text:span text:style-name="T15">logic </text:span><text:span text:style-name="T14">errors</text:span><text:span text:style-name="T12">.</text:span></text:p>
      <text:p text:style-name="P13"/>
      <text:p text:style-name="P7">LocalDateTime</text:p>
      <text:p text:style-name="P18">Temporal data is managed via the <text:span text:style-name="T2">java.time </text:span>API, specifically for ISO-8601 compliance.</text:p>
      <text:p text:style-name="P13"/>
      <text:p text:style-name="P8">Optional</text:p>
      <text:p text:style-name="P19"><text:span text:style-name="T22">To avoid the risk of a NullPointerException given by accesses to fields or methods of null objects,</text:span> we allow <text:span text:style-name="T22">ourselves to </text:span>check easily at all times, before any operation <text:span text:style-name="T24">with a potential access to null-object fields, </text:span><text:span text:style-name="T25">forcing also </text:span><text:span text:style-name="T26">compile-time syntax </text:span><text:span text:style-name="T25">safe</text:span><text:span text:style-name="T26">ty </text:span><text:span text:style-name="T25">standards</text:span>.</text:p>
      <text:p text:style-name="P19"/>
      <text:p text:style-name="P9">Custom Exceptions Handling</text:p>
      <text:p text:style-name="P21">The system uses a robust system of checked exceptions that impede propagation of errors, and their report to users or their automatic handling by the system.</text:p>
      <text:p text:style-name="P13"/>
      <text:p text:style-name="P4">Data Structures</text:p>
      <text:p text:style-name="P4"/>
      <text:p text:style-name="P6">Memory-efficient Seat Mapping</text:p>
      <text:p text:style-name="P14">To avoid having to instantiate, at minimum, 200 booleans (i.e. 200 bytes – 1 <text:span text:style-name="T23">per</text:span> seat), the approach is to instantiate 25 bytes, meaning 2<text:span text:style-name="T23">00 </text:span>bits, meaning at least 1 bit per seating spot, allowing for an evident reduction in memory usage.</text:p>
      <text:p text:style-name="P15">Checking for available seats translates to O(1) complexity via bitwise operations with carefully-built bitmasks.</text:p>
      <text:p text:style-name="P14"/>
      <text:p text:style-name="P5">BigDecimal</text:p>
      <text:p text:style-name="P22">Class allowing us to store ticket prices with arbitrary precision (<text:span text:style-name="T6">a scale of 2</text:span>, in our case), without any loss that would necessarily be present if we were to use JVM’s basic <text:span text:style-name="T2">float</text:span>s or <text:span text:style-name="T2">double</text:span>s, that are, <text:span text:style-name="T1">instead, </text:span>IEEE754 standard-compliant.</text:p>
      <text:p text:style-name="P22"><text:soft-page-break/></text:p>
      <text:p text:style-name="P24">Final classes over Records</text:p>
      <text:p text:style-name="P23">It’s been decided to implement final classes over records, given the fact that manipulating records to throw a checked exception makes code harder to read, going against the simplicity in the design of records. It’s preferrable to have classes such as Film, Projection, SeatMap throw checked exceptions upon construction, having a safer system overall.</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5T21:55:16.862727114</meta:creation-date>
    <dc:date>2026-05-13T10:48:25.585525006</dc:date>
    <meta:editing-duration>PT1H8M20S</meta:editing-duration>
    <meta:editing-cycles>36</meta:editing-cycles>
    <meta:generator>LibreOffice/24.2.7.2$Linux_X86_64 LibreOffice_project/420$Build-2</meta:generator>
    <meta:document-statistic meta:table-count="0" meta:image-count="0" meta:object-count="0" meta:page-count="2" meta:paragraph-count="22" meta:word-count="404" meta:character-count="2739" meta:non-whitespace-character-count="2356"/>
  </office:meta>
</office:document-meta>
</file>